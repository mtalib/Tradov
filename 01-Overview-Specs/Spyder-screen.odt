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0B76734F0DB.png" manifest:media-type="image/png"/>
  <manifest:file-entry manifest:full-path="Pictures/10000001000003C4000000BED00E6D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2" text:anchor-type="char" svg:width="8.0217in" svg:height="1.5807in" draw:z-index="1"><draw:image xlink:href="Pictures/10000001000003C4000000BED00E6D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1.6118in" draw:z-index="0"><draw:image xlink:href="Pictures/1000000100000312000000B76734F0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8:10:01.176077846</meta:creation-date>
    <dc:date>2026-05-15T03:38:55.165674175</dc:date>
    <meta:editing-duration>PT9H17M3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5.2$Linux_X86_64 LibreOffice_project/580$Build-2</meta:generator>
  </office:meta>
</office:document-meta>
</file>